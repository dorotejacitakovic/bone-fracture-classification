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083in" fo:margin-left="-0.0063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6667in"/>
    </style:style>
    <style:style style:name="Table1.C" style:family="table-column">
      <style:table-column-properties style:column-width="1.6771in"/>
    </style:style>
    <style:style style:name="Table1.A1" style:family="table-cell">
      <style:table-cell-properties style:vertical-align="middle" fo:background-color="#39a094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39a094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0.4403in"/>
    </style:style>
    <style:style style:name="Table1.4" style:family="table-row">
      <style:table-row-properties style:min-row-height="0.4618in"/>
    </style:style>
    <style:style style:name="Table1.5" style:family="table-row">
      <style:table-row-properties style:min-row-height="0.5014in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03f5c" officeooo:paragraph-rsid="00003f5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03f5c" officeooo:paragraph-rsid="00003f5c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fo:font-size="13pt" fo:font-weight="normal" officeooo:rsid="00003f5c" officeooo:paragraph-rsid="00003f5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font-size="13pt" fo:font-weight="normal" officeooo:rsid="00003f5c" officeooo:paragraph-rsid="000072bf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3pt" style:text-underline-style="none" fo:font-weight="normal" officeooo:rsid="00003f5c" officeooo:paragraph-rsid="00003f5c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style:text-underline-style="none" fo:font-weight="normal" officeooo:rsid="00003f5c" officeooo:paragraph-rsid="00003f5c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3pt" style:text-underline-style="none" fo:font-weight="normal" officeooo:rsid="000072bf" officeooo:paragraph-rsid="000072bf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style:text-underline-style="none" fo:font-weight="normal" officeooo:rsid="000072bf" officeooo:paragraph-rsid="000072bf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italic" style:text-underline-style="none" fo:font-weight="normal" officeooo:rsid="000072bf" officeooo:paragraph-rsid="000072bf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072bf" officeooo:paragraph-rsid="000072bf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19a9b" officeooo:paragraph-rsid="00019a9b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31e61" officeooo:paragraph-rsid="00031e61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4pt" fo:font-style="italic" style:text-underline-style="none" fo:font-weight="bold" officeooo:rsid="000072bf" officeooo:paragraph-rsid="000072bf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4pt" fo:font-style="italic" style:text-underline-style="none" fo:font-weight="bold" officeooo:rsid="00019a9b" officeooo:paragraph-rsid="00019a9b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4pt" fo:font-style="italic" style:text-underline-style="none" fo:font-weight="bold" officeooo:rsid="00031e61" officeooo:paragraph-rsid="00031e61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normal" style:text-underline-style="none" fo:font-weight="normal" officeooo:rsid="000072bf" officeooo:paragraph-rsid="000072b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">
      <style:paragraph-properties fo:line-height="115%" fo:text-align="start" style:justify-single-word="false"/>
      <style:text-properties style:text-line-through-style="none" style:text-line-through-type="none" fo:font-size="13pt" style:text-underline-style="none" fo:font-weight="normal" officeooo:rsid="00003f5c" officeooo:paragraph-rsid="00003f5c" style:font-size-asian="11.3500003814697pt" style:font-weight-asian="normal" style:font-size-complex="13pt" style:font-weight-complex="normal"/>
    </style:style>
    <style:style style:name="P18" style:family="paragraph" style:parent-style-name="Standard" style:list-style-name="L2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31e61" officeooo:paragraph-rsid="00031e61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413a3" officeooo:paragraph-rsid="000413a3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19a9b" officeooo:paragraph-rsid="00019a9b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5a03c" officeooo:paragraph-rsid="0005a03c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5a03c" officeooo:paragraph-rsid="0005a03c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918ba" officeooo:paragraph-rsid="000918ba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ac331" officeooo:paragraph-rsid="000ac331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ac331" officeooo:paragraph-rsid="000ac331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0ca704" officeooo:paragraph-rsid="000ca704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3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bold" officeooo:rsid="000413a3" officeooo:paragraph-rsid="000413a3" style:font-size-asian="11.3500003814697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bold" officeooo:rsid="000413a3" officeooo:paragraph-rsid="000413a3" style:font-size-asian="11.3500003814697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5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bold" officeooo:rsid="000413a3" officeooo:paragraph-rsid="000413a3" style:font-size-asian="11.3500003814697pt" style:font-style-asian="normal" style:font-weight-asian="bold" style:font-size-complex="13pt" style:font-style-complex="normal" style:font-weight-complex="bold"/>
    </style:style>
    <style:style style:name="P30" style:family="paragraph" style:parent-style-name="Standard" style:list-style-name="L6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bold" officeooo:rsid="000413a3" officeooo:paragraph-rsid="000413a3" style:font-size-asian="11.3500003814697pt" style:font-style-asian="normal" style:font-weight-asian="bold" style:font-size-complex="13pt" style:font-style-complex="normal" style:font-weight-complex="bold"/>
    </style:style>
    <style:style style:name="P31" style:family="paragraph" style:parent-style-name="Standard" style:list-style-name="L7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bold" officeooo:rsid="0005a03c" officeooo:paragraph-rsid="0005a03c" style:font-size-asian="11.3500003814697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bold" officeooo:rsid="000918ba" officeooo:paragraph-rsid="000918ba" style:font-size-asian="11.3500003814697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3pt" fo:font-style="normal" style:text-underline-style="none" fo:font-weight="bold" officeooo:rsid="000ac331" officeooo:paragraph-rsid="000ac331" style:font-size-asian="11.3500003814697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4pt" fo:font-style="italic" style:text-underline-style="solid" style:text-underline-width="auto" style:text-underline-color="font-color" fo:font-weight="bold" officeooo:rsid="000413a3" officeooo:paragraph-rsid="000413a3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4pt" fo:font-style="italic" style:text-underline-style="solid" style:text-underline-width="auto" style:text-underline-color="font-color" fo:font-weight="bold" officeooo:rsid="0005a03c" officeooo:paragraph-rsid="0005a03c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paragraph-properties fo:line-height="115%" fo:text-align="start" style:justify-single-word="false"/>
      <style:text-properties style:text-line-through-style="none" style:text-line-through-type="none" fo:font-size="15pt" fo:font-style="italic" style:text-underline-style="none" fo:font-weight="bold" officeooo:rsid="000ac331" officeooo:paragraph-rsid="000ac331" style:font-size-asian="15pt" style:font-style-asian="italic" style:font-weight-asian="bold" style:font-size-complex="15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fo:font-size="13pt" officeooo:rsid="0005a03c" officeooo:paragraph-rsid="0005a03c" style:font-size-asian="11.3500003814697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19a9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62e8" style:font-weight-asian="normal" style:font-weight-complex="normal"/>
    </style:style>
    <style:style style:name="T6" style:family="text">
      <style:text-properties fo:font-weight="normal" officeooo:rsid="0010f29e" style:font-weight-asian="normal" style:font-weight-complex="normal"/>
    </style:style>
    <style:style style:name="T7" style:family="text">
      <style:text-properties officeooo:rsid="0005a03c"/>
    </style:style>
    <style:style style:name="T8" style:family="text">
      <style:text-properties officeooo:rsid="00078337"/>
    </style:style>
    <style:style style:name="T9" style:family="text">
      <style:text-properties officeooo:rsid="000ac331"/>
    </style:style>
    <style:style style:name="T10" style:family="text">
      <style:text-properties officeooo:rsid="000e2349"/>
    </style:style>
    <style:style style:name="T11" style:family="text">
      <style:text-properties officeooo:rsid="000e27b2"/>
    </style:style>
    <style:style style:name="T12" style:family="text">
      <style:text-properties officeooo:rsid="000e62e8"/>
    </style:style>
    <style:style style:name="T13" style:family="text">
      <style:text-properties officeooo:rsid="000f84b4"/>
    </style:style>
    <style:style style:name="T14" style:family="text">
      <style:text-properties officeooo:rsid="0010f29e"/>
    </style:style>
    <style:style style:name="T15" style:family="text">
      <style:text-properties officeooo:rsid="0011f9bb"/>
    </style:style>
    <style:style style:name="T16" style:family="text">
      <style:text-properties officeooo:rsid="00127e3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asifikacija preloma – ADOS projekat</text:p>
      <text:p text:style-name="P1"/>
      <text:p text:style-name="P3">Cilj ovog projekta je razvoj automatizovanog sistema koji na osnovu ulazne slike klasifikuje da li je prisutan prelom kosti, koristeći kombinaciju <text:span text:style-name="T14">mašinskog </text:span>učenja (YOLOv8) i klasičnih metoda obrade slike (OpenCV).</text:p>
      <text:p text:style-name="P3"/>
      <text:p text:style-name="P3"/>
      <text:p text:style-name="P4">Za izradu projekta korišćen je dataset koji sadrži rendgenske snimke kostiju organizovane u dve klase:</text:p>
      <text:list text:style-name="L1">
        <text:list-item>
          <text:p text:style-name="P17">fractured – snimci sa prisustvom preloma</text:p>
        </text:list-item>
        <text:list-item>
          <text:p text:style-name="P17">not fractured – snimci bez preloma</text:p>
        </text:list-item>
      </text:list>
      <text:p text:style-name="P6"/>
      <text:p text:style-name="P8">Podaci su podeljeni u tri skupa:</text:p>
      <text:p text:style-name="P8">1. <text:span text:style-name="T1">train</text:span> – 9246 slika</text:p>
      <text:p text:style-name="P8">2. <text:span text:style-name="T1">val</text:span> – 829 slika</text:p>
      <text:p text:style-name="P8">3. <text:span text:style-name="T1">test </text:span>– 506 slika</text:p>
      <text:p text:style-name="P8"/>
      <text:p text:style-name="P9"><text:span text:style-name="T2">* Dataset: </text:span>https://www.kaggle.com/datasets/bmadushanirodrigo/fracture-</text:p>
      <text:p text:style-name="P9">multi-region-x-ray-data</text:p>
      <text:p text:style-name="P9"/>
      <text:p text:style-name="P8"/>
      <text:p text:style-name="P13">KORAK 1: TRENIRANJE MODELA</text:p>
      <text:p text:style-name="P10">Za treniranje binarnog klasifikatora korišćen je YOLOv8 model <text:span text:style-name="T11">i</text:span> treniranje je izvršeno na Kaggle platformi. Model je treniran na originalnim snimcima u 20 epoha, veličina slika 224x224, bez preprocessinga kako bi se dobio bazni (baseline) rezultat.</text:p>
      <text:p text:style-name="P10"/>
      <text:p text:style-name="P10"/>
      <text:p text:style-name="P14">KORAK 2: INFERENCIJA POMOĆU OPENCV DNN</text:p>
      <text:p text:style-name="P11">Nakon treniranja, model je exportovan u ONNX format kako bi mogao biti učitan kroz OpenCV DNN modul.</text:p>
      <text:p text:style-name="P11">Ovim se generiše best.onnx fajl – <text:span text:style-name="T16">čuva strukturu i naučene parametre modela u formatu koji može da koristi bilo koja biblioteka, uključujući i OpenCV.</text:span></text:p>
      <text:p text:style-name="P11"/>
      <text:p text:style-name="P12">U <text:span text:style-name="T3">inferenciji</text:span> se vrši:</text:p>
      <text:list text:style-name="L2">
        <text:list-item>
          <text:p text:style-name="P18">Učitavanje modela</text:p>
        </text:list-item>
        <text:list-item>
          <text:p text:style-name="P18">Konverzija slike u blob format</text:p>
        </text:list-item>
        <text:list-item>
          <text:p text:style-name="P18">Propuštanje kroz mrežu</text:p>
        </text:list-item>
        <text:list-item>
          <text:p text:style-name="P18">Primena Softmax funkcije - za dobavljanje verovatnoće po klasama</text:p>
        </text:list-item>
        <text:list-item>
          <text:p text:style-name="P18">Odabir klase sa najvećom verovatnoćom</text:p>
        </text:list-item>
      </text:list>
      <text:p text:style-name="P12"/>
      <text:p text:style-name="P12">Inferencija je testirana na test skupu od 506 slika i postignuta je tačnost od 98.6%.</text:p>
      <text:p text:style-name="P12"><text:soft-page-break/></text:p>
      <text:p text:style-name="P15">KORAK 3: PREPROCESSING SA OPENCV</text:p>
      <text:p text:style-name="P19">Preprocessing je uveden u fazi inferencije – sve transformacije se primenjuju na sliku pre nego <text:span text:style-name="T14">š</text:span>to se ona prosleđuje mreži.</text:p>
      <text:p text:style-name="P19">Testirane su 4 metode <text:span text:style-name="T7">i</text:span> njihova kombinacija.</text:p>
      <text:p text:style-name="P19"/>
      <text:p text:style-name="P34">Implementirane metode:</text:p>
      <text:list text:style-name="L3">
        <text:list-item>
          <text:p text:style-name="P27">CLAHE (Contrast Limited Adaptive Histogram Equalization)</text:p>
        </text:list-item>
      </text:list>
      <text:p text:style-name="P28"><text:span text:style-name="T4"><text:tab/>- Lokalno pojačavanje kontrasta slike. Slika se konvertuje u grayscale, CLAHE s</text:span><text:span text:style-name="T5">e</text:span><text:span text:style-name="T4"> <text:tab/>primenjuje po malim segmentima, a zatim se vraća u BGR format.</text:span></text:p>
      <text:p text:style-name="P28"><text:span text:style-name="T4"><text:tab/>Korisno za X-ray snimke koji često imaju slab kontrast.</text:span></text:p>
      <text:p text:style-name="P28"><text:span text:style-name="T4"/></text:p>
      <text:list text:style-name="L5">
        <text:list-item>
          <text:p text:style-name="P29">Gaussian Blur</text:p>
        </text:list-item>
      </text:list>
      <text:p text:style-name="P28"><text:tab/>- <text:span text:style-name="T4">Blago zamagljivanje slike kernelom 5x5. Služi za uklanjanje šuma </text:span><text:span text:style-name="T5">i</text:span><text:span text:style-name="T4"> sitnih <text:tab/></text:span><text:span text:style-name="T6">neželjenih detalja</text:span><text:span text:style-name="T4"> iz slike. Primenjuje se direktno na BGR sliku.</text:span></text:p>
      <text:p text:style-name="P11"/>
      <text:list text:style-name="L6">
        <text:list-item>
          <text:p text:style-name="P30">Canny Edge Detection</text:p>
        </text:list-item>
      </text:list>
      <text:p text:style-name="P19"><text:tab/>- Detekcija ivica <text:span text:style-name="T7">na slici sa pragovima threshold1 = 50 </text:span><text:span text:style-name="T12">i</text:span><text:span text:style-name="T7"> threshold2 = 150. Rezultat je <text:tab/>binarna slika koja prikazuje samo konture.</text:span></text:p>
      <text:p text:style-name="P21"><text:tab/>Primenjuje se na grayscale verziji slike.</text:p>
      <text:p text:style-name="P21"/>
      <text:list text:style-name="L7">
        <text:list-item>
          <text:p text:style-name="P31">CLAHE + Gaussian Blur</text:p>
        </text:list-item>
      </text:list>
      <text:p text:style-name="P21"><text:tab/>- Kombinacija ove dve metode: najpre se pojačava kontrast pomoću CLAHE, zatim <text:tab/>se primenjuje Gaussian blur za uklanjanje šuma nastalog pojačavanjem.</text:p>
      <text:p text:style-name="P21"/>
      <text:p text:style-name="P21"/>
      <text:p text:style-name="P35">Rezultati po metodama:</text:p>
      <text:p text:style-name="P22">Testiranje je izvršeno nad celim test skupom od 506 slika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37">Metoda preprocessinga</text:p>
          </table:table-cell>
          <table:table-cell table:style-name="Table1.A1" office:value-type="string">
            <text:p text:style-name="P37">Tačno</text:p>
          </table:table-cell>
          <table:table-cell table:style-name="Table1.A1" office:value-type="string">
            <text:p text:style-name="P37">Ukupno</text:p>
          </table:table-cell>
          <table:table-cell table:style-name="Table1.D1" office:value-type="string">
            <text:p text:style-name="P37">Tačnost (%)</text:p>
          </table:table-cell>
        </table:table-row>
        <table:table-row>
          <table:table-cell table:style-name="Table1.A2" office:value-type="string">
            <text:p text:style-name="P37">Bez preprocessinga (baseline)</text:p>
          </table:table-cell>
          <table:table-cell table:style-name="Table1.A2" office:value-type="string">
            <text:p text:style-name="P37">499</text:p>
          </table:table-cell>
          <table:table-cell table:style-name="Table1.A2" office:value-type="string">
            <text:p text:style-name="P37">506</text:p>
          </table:table-cell>
          <table:table-cell table:style-name="Table1.D2" office:value-type="string">
            <text:p text:style-name="P37">98.6%</text:p>
          </table:table-cell>
        </table:table-row>
        <table:table-row table:style-name="Table1.3">
          <table:table-cell table:style-name="Table1.A2" office:value-type="string">
            <text:p text:style-name="P37">Gaussian Blur</text:p>
          </table:table-cell>
          <table:table-cell table:style-name="Table1.A2" office:value-type="string">
            <text:p text:style-name="P37">497</text:p>
          </table:table-cell>
          <table:table-cell table:style-name="Table1.A2" office:value-type="string">
            <text:p text:style-name="P37">506</text:p>
          </table:table-cell>
          <table:table-cell table:style-name="Table1.D2" office:value-type="string">
            <text:p text:style-name="P37">98.2%</text:p>
          </table:table-cell>
        </table:table-row>
        <table:table-row table:style-name="Table1.4">
          <table:table-cell table:style-name="Table1.A2" office:value-type="string">
            <text:p text:style-name="P37">CLAHE + Gaussian Blur</text:p>
          </table:table-cell>
          <table:table-cell table:style-name="Table1.A2" office:value-type="string">
            <text:p text:style-name="P37">491</text:p>
          </table:table-cell>
          <table:table-cell table:style-name="Table1.A2" office:value-type="string">
            <text:p text:style-name="P37">506</text:p>
          </table:table-cell>
          <table:table-cell table:style-name="Table1.D2" office:value-type="string">
            <text:p text:style-name="P37">97.0%</text:p>
          </table:table-cell>
        </table:table-row>
        <table:table-row table:style-name="Table1.5">
          <table:table-cell table:style-name="Table1.A2" office:value-type="string">
            <text:p text:style-name="P37">CLAHE</text:p>
          </table:table-cell>
          <table:table-cell table:style-name="Table1.A2" office:value-type="string">
            <text:p text:style-name="P37">490</text:p>
          </table:table-cell>
          <table:table-cell table:style-name="Table1.A2" office:value-type="string">
            <text:p text:style-name="P37">506</text:p>
          </table:table-cell>
          <table:table-cell table:style-name="Table1.D2" office:value-type="string">
            <text:p text:style-name="P37">96.8%</text:p>
          </table:table-cell>
        </table:table-row>
        <table:table-row>
          <table:table-cell table:style-name="Table1.A2" office:value-type="string">
            <text:p text:style-name="P37">Cann<text:span text:style-name="T8">y</text:span> Edge Detection</text:p>
          </table:table-cell>
          <table:table-cell table:style-name="Table1.A2" office:value-type="string">
            <text:p text:style-name="P37">238</text:p>
          </table:table-cell>
          <table:table-cell table:style-name="Table1.A2" office:value-type="string">
            <text:p text:style-name="P37">506</text:p>
          </table:table-cell>
          <table:table-cell table:style-name="Table1.D2" office:value-type="string">
            <text:p text:style-name="P37">47.0%</text:p>
          </table:table-cell>
        </table:table-row>
      </table:table>
      <text:p text:style-name="P21"/>
      <text:p text:style-name="P21"><text:soft-page-break/></text:p>
      <text:p text:style-name="P32">1. Baseline (98.6%) - bez preprocessinga:</text:p>
      <text:p text:style-name="P23">- Model treniran na<text:span text:style-name="T14">d</text:span> originalnim snimcima postigao je najvišu tačnost na test skupu.</text:p>
      <text:p text:style-name="P23">Ovo je očekivano – model je naučio karakteristike originalnih slika <text:span text:style-name="T12">i</text:span> najbolje ih prepoznaje u originalnom obliku.</text:p>
      <text:p text:style-name="P23"/>
      <text:p text:style-name="P32">2. Gaussian blur (98.2%) - minimalan pad:</text:p>
      <text:p text:style-name="P23">- Blago zamagljivanje neznatno smanjuje tačnost. Blur uklanja šum a<text:span text:style-name="T13">li</text:span> ujedno <text:span text:style-name="T13">i</text:span> fine detalje koji su modelu korisni za prepoznavanje preloma.</text:p>
      <text:p text:style-name="P23">Pad je mali, što znači da model nije previše oslonjen na visokofrekventne detalje.</text:p>
      <text:p text:style-name="P23"/>
      <text:p text:style-name="P32">3. CLAHE <text:span text:style-name="T15">i</text:span> CLAHE+Blur (96.8% - 97.0%) - umeren pad:</text:p>
      <text:p text:style-name="P23">- CLAHE menja <text:span text:style-name="T16">raspodelu </text:span>intenziteta piksela <text:span text:style-name="T16">po malim regionima slike</text:span>, čime slika izgleda drugačije od onoga na čemu je model treniran. Pošto model nije video CLAHE-obrađene slike tokom treniranja, dolazi do <text:span text:style-name="T9">blagog pada tačnosti. Kombinacija sa blurom dodatno menja sliku, ali razlika od baseline-a ostaje mala (~1.6%).</text:span></text:p>
      <text:p text:style-name="P23"/>
      <text:p text:style-name="P33">4. Canny Edge Detection (47.0%) - drastičan pad:</text:p>
      <text:p text:style-name="P24">- Canny pretvara sliku u binarnu mapu ivica – gubi se skoro sva informacija o teksturi, gustini kosti <text:span text:style-name="T13">i</text:span> nijansama sivih tonova koji su klju<text:span text:style-name="T16">č</text:span>ni za dijagnozu preloma. Model koji je treniran na<text:span text:style-name="T16">d originalnim</text:span> snimcima ne mo<text:span text:style-name="T16">ž</text:span>e da interpretira samo konture, pa tačnost pada na nivo slučajnog pogađanja.</text:p>
      <text:p text:style-name="P24"/>
      <text:p text:style-name="P24"/>
      <text:p text:style-name="P36">ZAKLJUČAK:</text:p>
      <text:p text:style-name="P25">Preprocessing u interferencijskoj fazi nije poboljšao tačnost u odnosu na baseline jer model nije bio izložen preprocessiranim slikama tokom treniranja. Da bi preprocessing dao bolje rezultate, trebalo bi ga primeniti <text:span text:style-name="T13">i</text:span> u trening fazi – tada bi model naučio reprezentacije preprocessiranih slika <text:span text:style-name="T13">i</text:span> potencijalno <text:span text:style-name="T13">po</text:span>stigao višu tačnost nad ovim podacima.</text:p>
      <text:p text:style-name="P25"/>
      <text:p text:style-name="P26">Baseline model sa 98.6% tačnošću na test skupu od 506 slika pokazuje da YOLOv8 efikasno rešava problem binarne klasifikacije preloma kostiju. Eksperimenti sa preprocessingom pokazali su da modifikacija slike u fazi interferencije ne poboljšava već dobro istreniran model, ali pruža korisne uvide u to koje karakteristike slike su važne za klasifikaciju.</text:p>
      <text:p text:style-name="P16"/>
      <text:p text:style-name="P7"/>
      <text:p text:style-name="P5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3T23:45:53.155236462</meta:creation-date>
    <meta:editing-duration>PT57M25S</meta:editing-duration>
    <meta:editing-cycles>12</meta:editing-cycles>
    <meta:generator>LibreOffice/24.2.7.2$Linux_X86_64 LibreOffice_project/420$Build-2</meta:generator>
    <dc:date>2026-06-24T01:28:14.603616185</dc:date>
    <meta:document-statistic meta:table-count="1" meta:image-count="0" meta:object-count="0" meta:page-count="3" meta:paragraph-count="76" meta:word-count="708" meta:character-count="4653" meta:non-whitespace-character-count="4011"/>
  </office:meta>
</office:document-meta>
</file>